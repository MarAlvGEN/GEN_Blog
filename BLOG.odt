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8167in"/>
    </style:style>
    <style:style style:name="Table1.B" style:family="table-column">
      <style:table-column-properties style:column-width="3.4646in"/>
    </style:style>
    <style:style style:name="Table1.C" style:family="table-column">
      <style:table-column-properties style:column-width="1.6438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0299in"/>
    </style:style>
    <style:style style:name="Table2.B" style:family="table-column">
      <style:table-column-properties style:column-width="1.9104in"/>
    </style:style>
    <style:style style:name="Table2.C" style:family="table-column">
      <style:table-column-properties style:column-width="2.9847in"/>
    </style:style>
    <style:style style:name="Table2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P1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3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5c578"/>
    </style:style>
    <style:style style:name="P4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dbbcb"/>
    </style:style>
    <style:style style:name="P5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rsid="001dbbcb" officeooo:paragraph-rsid="001dbbcb"/>
    </style:style>
    <style:style style:name="P6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a64e7"/>
    </style:style>
    <style:style style:name="P7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rsid="001bc7b5" officeooo:paragraph-rsid="001bc7b5"/>
    </style:style>
    <style:style style:name="P8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dbbcb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2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13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4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5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6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17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8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officeooo:rsid="0015c578"/>
    </style:style>
    <style:style style:name="T3" style:family="text">
      <style:text-properties officeooo:rsid="001dbbcb"/>
    </style:style>
    <style:style style:name="T4" style:family="text">
      <style:text-properties officeooo:rsid="001a64e7"/>
    </style:style>
    <style:style style:name="T5" style:family="text">
      <style:text-properties officeooo:rsid="001aeeff"/>
    </style:style>
    <style:style style:name="T6" style:family="text">
      <style:text-properties officeooo:rsid="001bc7b5"/>
    </style:style>
    <style:style style:name="T7" style:family="text">
      <style:text-properties officeooo:rsid="001c2230"/>
    </style:style>
    <style:style style:name="T8" style:family="text">
      <style:text-properties style:font-name="Google Sans Text"/>
    </style:style>
    <style:style style:name="T9" style:family="text">
      <style:text-properties officeooo:rsid="001eed83"/>
    </style:style>
    <style:style style:name="T10" style:family="text">
      <style:text-properties officeooo:rsid="002056d1"/>
    </style:style>
    <style:style style:name="T11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Ficha Técnica del Proyecto</text:h>
      <text:list text:style-name="L1">
        <text:list-item>
          <text:p text:style-name="P2"><text:span text:style-name="T1">Nombre del Proyecto:</text:span> <text:span text:style-name="T2">The Game Blog</text:span></text:p>
        </text:list-item>
        <text:list-item>
          <text:p text:style-name="P2"><text:span text:style-name="T1">Fecha de Inicio:</text:span> <text:span text:style-name="T2">Jul 6 de 2026.</text:span></text:p>
        </text:list-item>
        <text:list-item>
          <text:p text:style-name="P3"><text:span text:style-name="T1">Objetivo Principal:</text:span> <text:span text:style-name="T2">Lanzar un blog de Videojuegos con la intención de ser un punto de referencia para gamers con 5 post al mes.</text:span></text:p>
        </text:list-item>
        <text:list-item>
          <text:p text:style-name="P4"><text:span text:style-name="T1">Indicadores de éxito:</text:span> ¿Cómo medirás el éxito?: <text:s/></text:p>
        </text:list-item>
        <text:list-item>
          <text:p text:style-name="P4"><text:span text:style-name="T3">Tener un trafico de </text:span>1,000 visitas mensuale<text:span text:style-name="T4">s, </text:span></text:p>
        </text:list-item>
        <text:list-item>
          <text:p text:style-name="P5">Lograr meta de 5 post al mes</text:p>
        </text:list-item>
        <text:list-item>
          <text:p text:style-name="P5">Recibir minimo 10 interacciones de los visitantes.</text:p>
        </text:list-item>
      </text:list>
      <text:h text:style-name="P1" text:outline-level="2">2. Alcance (Lo que incluye y lo que no)</text:h>
      <text:list text:style-name="L2">
        <text:list-item>
          <text:p text:style-name="P6"><text:span text:style-name="T1">¿Qué haremos?:</text:span> </text:p>
        </text:list-item>
        <text:list-item>
          <text:p text:style-name="P6">Investigación de palabras clave <text:span text:style-name="T3">(Para SEO)</text:span>.</text:p>
        </text:list-item>
        <text:list-item>
          <text:p text:style-name="P6"><text:span text:style-name="T5">R</text:span>edacción <text:span text:style-name="T6">de reseñas</text:span>.</text:p>
        </text:list-item>
        <text:list-item>
          <text:p text:style-name="P7">Redacción de Tutoriales <text:s/>relacionados al gaming.</text:p>
        </text:list-item>
        <text:list-item>
          <text:p text:style-name="P6"><text:span text:style-name="T4">D</text:span>iseño de imágenes <text:span text:style-name="T7">atractivas para el usuario</text:span>.</text:p>
        </text:list-item>
        <text:list-item>
          <text:p text:style-name="P6"><text:span text:style-name="T1">¿Qué NO haremos?:</text:span> </text:p>
        </text:list-item>
        <text:list-item>
          <text:p text:style-name="P8">SEO técnico avanzado.</text:p>
        </text:list-item>
        <text:list-item>
          <text:p text:style-name="P8">publicidad pagada (Ads).</text:p>
        </text:list-item>
      </text:list>
      <text:h text:style-name="P1" text:outline-level="2"/>
      <text:h text:style-name="P1" text:outline-level="2"/>
      <text:p text:style-name="P9"/>
      <text:p text:style-name="P9"/>
      <text:p text:style-name="P9"/>
      <text:p text:style-name="P9"/>
      <text:h text:style-name="P1" text:outline-level="2"><text:soft-page-break/>3. Cronograma de Fases (Estructura Scrum)</text:h>
      <text:p text:style-name="P10">Divide el tiempo en "Sprints" o ciclos de trabajo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<text:span text:style-name="Strong_20_Emphasis"><text:span text:style-name="T8">Fase</text:span></text:span></text:p>
            </table:table-cell>
            <table:table-cell table:style-name="Table1.A1" office:value-type="string">
              <text:p text:style-name="P11"><text:span text:style-name="Strong_20_Emphasis"><text:span text:style-name="T8">Tareas Clave</text:span></text:span></text:p>
            </table:table-cell>
            <table:table-cell table:style-name="Table1.A1" office:value-type="string">
              <text:p text:style-name="P11"><text:span text:style-name="Strong_20_Emphasis"><text:span text:style-name="T8">Duración Estimada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2">Fase 1: Configuración</text:p>
          </table:table-cell>
          <table:table-cell table:style-name="Table1.A1" office:value-type="string">
            <text:p text:style-name="P13">Elegir dominio, plataforma <text:span text:style-name="T3">de deployment</text:span>, diseño básico.</text:p>
          </table:table-cell>
          <table:table-cell table:style-name="Table1.A1" office:value-type="string">
            <text:p text:style-name="P13">1 semana</text:p>
          </table:table-cell>
        </table:table-row>
        <table:table-row>
          <table:table-cell table:style-name="Table1.A1" office:value-type="string">
            <text:p text:style-name="P12">Fase 2: Contenido</text:p>
          </table:table-cell>
          <table:table-cell table:style-name="Table1.A1" office:value-type="string">
            <text:p text:style-name="P13">Redacción de los primeros 5 posts (Sprint 1).</text:p>
          </table:table-cell>
          <table:table-cell table:style-name="Table1.A1" office:value-type="string">
            <text:p text:style-name="P13">2 semanas</text:p>
          </table:table-cell>
        </table:table-row>
        <table:table-row>
          <table:table-cell table:style-name="Table1.A1" office:value-type="string">
            <text:p text:style-name="P12">Fase 3: Optimización</text:p>
          </table:table-cell>
          <table:table-cell table:style-name="Table1.A1" office:value-type="string">
            <text:p text:style-name="P13">SEO, enlaces internos, revisión final.</text:p>
          </table:table-cell>
          <table:table-cell table:style-name="Table1.A1" office:value-type="string">
            <text:p text:style-name="P13">1 semana</text:p>
          </table:table-cell>
        </table:table-row>
        <table:table-row>
          <table:table-cell table:style-name="Table1.A1" office:value-type="string">
            <text:p text:style-name="P12">Fase 4: Lanzamiento</text:p>
          </table:table-cell>
          <table:table-cell table:style-name="Table1.A1" office:value-type="string">
            <text:p text:style-name="P13">Publicación y promoción en redes sociales.</text:p>
          </table:table-cell>
          <table:table-cell table:style-name="Table1.A1" office:value-type="string">
            <text:p text:style-name="P13">Continua</text:p>
          </table:table-cell>
        </table:table-row>
      </table:table>
      <text:h text:style-name="P1" text:outline-level="2"/>
      <text:h text:style-name="P1" text:outline-level="2">4. Recursos Necesarios</text:h>
      <text:list text:style-name="L3">
        <text:list-item>
          <text:p text:style-name="P14"><text:span text:style-name="T1">Herramientas:</text:span> Trello (gestión), Canva (diseño), Google Analytics (análisis), <text:span text:style-name="T3">VSCode</text:span></text:p>
        </text:list-item>
        <text:list-item>
          <text:p text:style-name="P14"><text:span text:style-name="T1">Presupuesto (si aplica):</text:span> Dominio $15, Hosting $50.</text:p>
        </text:list-item>
        <text:list-item>
          <text:p text:style-name="P14"><text:span text:style-name="T1">Equipo:</text:span> <text:span text:style-name="T9">Simon Franco, Miguel Angel, Mauricio Alvarez</text:span></text:p>
        </text:list-item>
      </text:list>
      <text:h text:style-name="P1" text:outline-level="2">5. Matriz de Riesgos</text:h>
      <text:p text:style-name="P10">¿Qué podría salir mal y cómo lo evitarás?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1"><text:span text:style-name="Strong_20_Emphasis"><text:span text:style-name="T8">Riesgo</text:span></text:span></text:p>
            </table:table-cell>
            <table:table-cell table:style-name="Table2.A1" office:value-type="string">
              <text:p text:style-name="P11"><text:span text:style-name="Strong_20_Emphasis"><text:span text:style-name="T8">Impacto (Alto/Medio/Bajo)</text:span></text:span></text:p>
            </table:table-cell>
            <table:table-cell table:style-name="Table2.A1" office:value-type="string">
              <text:p text:style-name="P11"><text:span text:style-name="Strong_20_Emphasis"><text:span text:style-name="T8">Plan de Mitigación</text:span></text:span></text:p>
            </table:table-cell>
          </table:table-row>
        </table:table-header-rows>
        <table:table-row>
          <table:table-cell table:style-name="Table2.A1" office:value-type="string">
            <text:p text:style-name="P13">Falta de tiempo para escribir</text:p>
          </table:table-cell>
          <table:table-cell table:style-name="Table2.A1" office:value-type="string">
            <text:p text:style-name="P13">Alto</text:p>
          </table:table-cell>
          <table:table-cell table:style-name="Table2.A1" office:value-type="string">
            <text:p text:style-name="P13">Dedicar 1 hora fija cada mañana.</text:p>
          </table:table-cell>
        </table:table-row>
        <table:table-row>
          <table:table-cell table:style-name="Table2.A1" office:value-type="string">
            <text:p text:style-name="P13">Problemas técnicos en <text:soft-page-break/>la web</text:p>
          </table:table-cell>
          <table:table-cell table:style-name="Table2.A1" office:value-type="string">
            <text:p text:style-name="P13">Medio<text:soft-page-break/></text:p>
          </table:table-cell>
          <table:table-cell table:style-name="Table2.A1" office:value-type="string">
            <text:p text:style-name="P13">Contratar un servicio de hosting <text:soft-page-break/>con soporte <text:span text:style-name="T10">tener orientación al detalle antes de hacer push</text:span>.</text:p>
          </table:table-cell>
        </table:table-row>
      </table:table>
      <text:h text:style-name="P1" text:outline-level="2">6. Siguientes Pasos (Acciones Inmediatas)</text:h>
      <text:list text:style-name="L4">
        <text:list-item>
          <text:p text:style-name="P15">Comprar dominio y configurar hosting.</text:p>
        </text:list-item>
        <text:list-item>
          <text:p text:style-name="P15">Crear el tablero en <text:span text:style-name="T1">Trello</text:span> con las columnas (Backlog, To-do, Doing, Done).</text:p>
        </text:list-item>
        <text:list-item>
          <text:p text:style-name="P15">Llenar el <text:span text:style-name="T11">Product Backlog</text:span> con los primeros 10 temas de artículos.</text:p>
        </text:list-item>
      </text:list>
      <text:h text:style-name="P16" text:outline-level="3">¿Cómo aplicar esto hoy mismo?</text:h>
      <text:list text:style-name="L5">
        <text:list-item>
          <text:p text:style-name="P17"><text:span text:style-name="T1">Copia y pega</text:span> este esquema en un documento de Word o Notion.</text:p>
        </text:list-item>
        <text:list-item>
          <text:p text:style-name="P17"><text:span text:style-name="T1">Define tu objetivo:</text:span> No intentes hacer todo a la vez; elige un objetivo pequeño para empezar (ej: "Tener el blog operativo antes del 1 de agosto").</text:p>
        </text:list-item>
        <text:list-item>
          <text:p text:style-name="P17"><text:span text:style-name="T1">Configura tu Trello:</text:span> Usa las fases del cronograma para crear tus primeras etiquetas o listas.</text:p>
        </text:list-item>
      </text:list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5:11:42.484798988</meta:creation-date>
    <dc:date>2026-07-06T15:39:04.464589407</dc:date>
    <meta:editing-duration>PT17M5S</meta:editing-duration>
    <meta:editing-cycles>8</meta:editing-cycles>
    <meta:generator>LibreOffice/25.8.7.3$Linux_X86_64 LibreOffice_project/580$Build-3</meta:generator>
    <meta:document-statistic meta:table-count="2" meta:image-count="0" meta:object-count="0" meta:page-count="3" meta:paragraph-count="57" meta:word-count="368" meta:character-count="2165" meta:non-whitespace-character-count="1872"/>
  </office:meta>
</office:document-meta>
</file>