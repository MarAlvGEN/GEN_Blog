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8167in"/>
    </style:style>
    <style:style style:name="Table1.B" style:family="table-column">
      <style:table-column-properties style:column-width="3.4646in"/>
    </style:style>
    <style:style style:name="Table1.C" style:family="table-column">
      <style:table-column-properties style:column-width="1.6438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0299in"/>
    </style:style>
    <style:style style:name="Table2.B" style:family="table-column">
      <style:table-column-properties style:column-width="1.9104in"/>
    </style:style>
    <style:style style:name="Table2.C" style:family="table-column">
      <style:table-column-properties style:column-width="2.9847in"/>
    </style:style>
    <style:style style:name="Table2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P1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3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5c578"/>
    </style:style>
    <style:style style:name="P4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a64e7"/>
    </style:style>
    <style:style style:name="P5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a64e7"/>
    </style:style>
    <style:style style:name="P6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rsid="001bc7b5" officeooo:paragraph-rsid="001bc7b5"/>
    </style:style>
    <style:style style:name="P7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9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10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1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2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3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14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officeooo:rsid="0015c578"/>
    </style:style>
    <style:style style:name="T3" style:family="text">
      <style:text-properties officeooo:rsid="001a64e7"/>
    </style:style>
    <style:style style:name="T4" style:family="text">
      <style:text-properties officeooo:rsid="001aeeff"/>
    </style:style>
    <style:style style:name="T5" style:family="text">
      <style:text-properties officeooo:rsid="001bc7b5"/>
    </style:style>
    <style:style style:name="T6" style:family="text">
      <style:text-properties officeooo:rsid="001c2230"/>
    </style:style>
    <style:style style:name="T7" style:family="text">
      <style:text-properties style:font-name="Google Sans Text"/>
    </style:style>
    <style:style style:name="T8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Ficha Técnica del Proyecto</text:h>
      <text:list text:style-name="L1">
        <text:list-item>
          <text:p text:style-name="P2"><text:span text:style-name="T1">Nombre del Proyecto:</text:span> <text:span text:style-name="T2">The Game Blog</text:span></text:p>
        </text:list-item>
        <text:list-item>
          <text:p text:style-name="P2"><text:span text:style-name="T1">Fecha de Inicio:</text:span> <text:span text:style-name="T2">Jul 6 de 2026.</text:span></text:p>
        </text:list-item>
        <text:list-item>
          <text:p text:style-name="P3"><text:span text:style-name="T1">Objetivo Principal:</text:span> <text:span text:style-name="T2">Lanzar un blog de Videojuegos con la intención de ser un punto de referencia para gamers con 5 post al mes.</text:span></text:p>
        </text:list-item>
        <text:list-item>
          <text:p text:style-name="P4"><text:span text:style-name="T1">KPIs (Indicadores de éxito):</text:span> ¿Cómo medirás el éxito?: 1,000 visitas mensuale<text:span text:style-name="T3">s.</text:span></text:p>
        </text:list-item>
      </text:list>
      <text:h text:style-name="P1" text:outline-level="2">2. Alcance (Lo que incluye y lo que no)</text:h>
      <text:list text:style-name="L2">
        <text:list-item>
          <text:p text:style-name="P5"><text:span text:style-name="T1">¿Qué haremos?:</text:span> </text:p>
        </text:list-item>
        <text:list-item>
          <text:p text:style-name="P5">Investigación de palabras clave.</text:p>
        </text:list-item>
        <text:list-item>
          <text:p text:style-name="P5"><text:span text:style-name="T4">R</text:span>edacción <text:span text:style-name="T5">de reseñas</text:span>.</text:p>
        </text:list-item>
        <text:list-item>
          <text:p text:style-name="P6">Redacción de Tutoriales <text:s/>relacionados al gaming.</text:p>
        </text:list-item>
        <text:list-item>
          <text:p text:style-name="P5"><text:span text:style-name="T3">D</text:span>iseño de imágenes <text:span text:style-name="T6">atractivas para el usuario</text:span>.</text:p>
        </text:list-item>
        <text:list-item>
          <text:p text:style-name="P5"><text:span text:style-name="T1">¿Qué NO haremos?:</text:span> </text:p>
        </text:list-item>
        <text:list-item>
          <text:p text:style-name="P5">SEO técnico avanzado, publicidad pagada (Ads).</text:p>
        </text:list-item>
      </text:list>
      <text:h text:style-name="P1" text:outline-level="2">3. Cronograma de Fases (Estructura Scrum)</text:h>
      <text:p text:style-name="P7">Divide el tiempo en "Sprints" o ciclos de trabajo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"><text:span text:style-name="Strong_20_Emphasis"><text:span text:style-name="T7">Fase</text:span></text:span></text:p>
            </table:table-cell>
            <table:table-cell table:style-name="Table1.A1" office:value-type="string">
              <text:p text:style-name="P8"><text:span text:style-name="Strong_20_Emphasis"><text:span text:style-name="T7">Tareas Clave</text:span></text:span></text:p>
            </table:table-cell>
            <table:table-cell table:style-name="Table1.A1" office:value-type="string">
              <text:p text:style-name="P8"><text:span text:style-name="Strong_20_Emphasis"><text:span text:style-name="T7">Duración Estimada</text:span></text:span></text:p>
            </table:table-cell>
          </table:table-row>
        </table:table-header-rows>
        <table:table-row>
          <table:table-cell table:style-name="Table1.A1" office:value-type="string">
            <text:p text:style-name="P9">Fase 1: Configuración</text:p>
          </table:table-cell>
          <table:table-cell table:style-name="Table1.A1" office:value-type="string">
            <text:p text:style-name="P10">Elegir dominio, plataforma, diseño básico.</text:p>
          </table:table-cell>
          <table:table-cell table:style-name="Table1.A1" office:value-type="string">
            <text:p text:style-name="P10">1 semana</text:p>
          </table:table-cell>
        </table:table-row>
        <table:table-row>
          <table:table-cell table:style-name="Table1.A1" office:value-type="string">
            <text:p text:style-name="P9">Fase 2: Contenido</text:p>
          </table:table-cell>
          <table:table-cell table:style-name="Table1.A1" office:value-type="string">
            <text:p text:style-name="P10">Redacción de los primeros 5 posts (Sprint 1).</text:p>
          </table:table-cell>
          <table:table-cell table:style-name="Table1.A1" office:value-type="string">
            <text:p text:style-name="P10">2 semanas</text:p>
          </table:table-cell>
        </table:table-row>
        <table:table-row>
          <table:table-cell table:style-name="Table1.A1" office:value-type="string">
            <text:p text:style-name="P9">Fase 3: Optimización</text:p>
          </table:table-cell>
          <table:table-cell table:style-name="Table1.A1" office:value-type="string">
            <text:p text:style-name="P10">SEO, enlaces internos, revisión final.</text:p>
          </table:table-cell>
          <table:table-cell table:style-name="Table1.A1" office:value-type="string">
            <text:p text:style-name="P10">1 semana</text:p>
          </table:table-cell>
        </table:table-row>
        <table:table-row>
          <table:table-cell table:style-name="Table1.A1" office:value-type="string">
            <text:p text:style-name="P9">Fase 4: <text:soft-page-break/>Lanzamiento</text:p>
          </table:table-cell>
          <table:table-cell table:style-name="Table1.A1" office:value-type="string">
            <text:p text:style-name="P10">Publicación y promoción en redes <text:soft-page-break/>sociales.</text:p>
          </table:table-cell>
          <table:table-cell table:style-name="Table1.A1" office:value-type="string">
            <text:p text:style-name="P10">Continua<text:soft-page-break/></text:p>
          </table:table-cell>
        </table:table-row>
      </table:table>
      <text:h text:style-name="P1" text:outline-level="2">4. Recursos Necesarios</text:h>
      <text:list text:style-name="L3">
        <text:list-item>
          <text:p text:style-name="P11"><text:span text:style-name="T1">Herramientas:</text:span> Trello (gestión), WordPress (CMS), Canva (diseño), Google Analytics (análisis).</text:p>
        </text:list-item>
        <text:list-item>
          <text:p text:style-name="P11"><text:span text:style-name="T1">Presupuesto (si aplica):</text:span> [Ej: Dominio $15, Hosting $50].</text:p>
        </text:list-item>
        <text:list-item>
          <text:p text:style-name="P11"><text:span text:style-name="T1">Equipo:</text:span> [Ej: Yo (redactor y diseñador)].</text:p>
        </text:list-item>
      </text:list>
      <text:h text:style-name="P1" text:outline-level="2">5. Matriz de Riesgos</text:h>
      <text:p text:style-name="P7">¿Qué podría salir mal y cómo lo evitarás?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8"><text:span text:style-name="Strong_20_Emphasis"><text:span text:style-name="T7">Riesgo</text:span></text:span></text:p>
            </table:table-cell>
            <table:table-cell table:style-name="Table2.A1" office:value-type="string">
              <text:p text:style-name="P8"><text:span text:style-name="Strong_20_Emphasis"><text:span text:style-name="T7">Impacto (Alto/Medio/Bajo)</text:span></text:span></text:p>
            </table:table-cell>
            <table:table-cell table:style-name="Table2.A1" office:value-type="string">
              <text:p text:style-name="P8"><text:span text:style-name="Strong_20_Emphasis"><text:span text:style-name="T7">Plan de Mitigación</text:span></text:span></text:p>
            </table:table-cell>
          </table:table-row>
        </table:table-header-rows>
        <table:table-row>
          <table:table-cell table:style-name="Table2.A1" office:value-type="string">
            <text:p text:style-name="P10">Falta de tiempo para escribir</text:p>
          </table:table-cell>
          <table:table-cell table:style-name="Table2.A1" office:value-type="string">
            <text:p text:style-name="P10">Alto</text:p>
          </table:table-cell>
          <table:table-cell table:style-name="Table2.A1" office:value-type="string">
            <text:p text:style-name="P10">Dedicar 1 hora fija cada mañana.</text:p>
          </table:table-cell>
        </table:table-row>
        <table:table-row>
          <table:table-cell table:style-name="Table2.A1" office:value-type="string">
            <text:p text:style-name="P10">Problemas técnicos en la web</text:p>
          </table:table-cell>
          <table:table-cell table:style-name="Table2.A1" office:value-type="string">
            <text:p text:style-name="P10">Medio</text:p>
          </table:table-cell>
          <table:table-cell table:style-name="Table2.A1" office:value-type="string">
            <text:p text:style-name="P10">Contratar un servicio de hosting con soporte.</text:p>
          </table:table-cell>
        </table:table-row>
      </table:table>
      <text:h text:style-name="P1" text:outline-level="2">6. Siguientes Pasos (Acciones Inmediatas)</text:h>
      <text:list text:style-name="L4">
        <text:list-item>
          <text:p text:style-name="P12">Comprar dominio y configurar hosting.</text:p>
        </text:list-item>
        <text:list-item>
          <text:p text:style-name="P12">Crear el tablero en <text:span text:style-name="T1">Trello</text:span> con las columnas (Backlog, To-do, Doing, Done).</text:p>
        </text:list-item>
        <text:list-item>
          <text:p text:style-name="P12">Llenar el <text:span text:style-name="T8">Product Backlog</text:span> con los primeros 10 temas de artículos.</text:p>
        </text:list-item>
      </text:list>
      <text:h text:style-name="P13" text:outline-level="3">¿Cómo aplicar esto hoy mismo?</text:h>
      <text:list text:style-name="L5">
        <text:list-item>
          <text:p text:style-name="P14"><text:span text:style-name="T1">Copia y pega</text:span> este esquema en un documento de Word o Notion.</text:p>
        </text:list-item>
        <text:list-item>
          <text:p text:style-name="P14"><text:span text:style-name="T1">Define tu objetivo:</text:span> No intentes hacer todo a la vez; elige un objetivo pequeño para empezar (ej: "Tener el blog operativo antes del 1 de agosto").</text:p>
        </text:list-item>
        <text:list-item>
          <text:p text:style-name="P14"><text:soft-page-break/><text:span text:style-name="T1">Configura tu Trello:</text:span> Usa las fases del cronograma para crear tus primeras etiquetas o listas.</text:p>
        </text:list-item>
      </text:list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5:11:42.484798988</meta:creation-date>
    <dc:date>2026-07-06T15:31:19.823388570</dc:date>
    <meta:editing-duration>PT9M23S</meta:editing-duration>
    <meta:editing-cycles>5</meta:editing-cycles>
    <meta:generator>LibreOffice/25.8.7.3$Linux_X86_64 LibreOffice_project/580$Build-3</meta:generator>
    <meta:document-statistic meta:table-count="2" meta:image-count="0" meta:object-count="0" meta:page-count="3" meta:paragraph-count="53" meta:word-count="336" meta:character-count="1999" meta:non-whitespace-character-count="1733"/>
  </office:meta>
</office:document-meta>
</file>